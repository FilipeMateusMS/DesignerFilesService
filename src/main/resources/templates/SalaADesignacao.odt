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73f" officeooo:paragraph-rsid="0000873f"/>
    </style:style>
    <style:style style:name="P2" style:family="paragraph" style:parent-style-name="Standard">
      <style:text-properties officeooo:paragraph-rsid="00022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da Sala A</text:p>
      <text:p text:style-name="Standard"/>
      <text:p text:style-name="P2">Principal 1: {{nmPrincipal[0]}}<text:line-break/>Ajudante 1: {{nmAjudante[0]}}<text:line-break/>Parte 1: {{codigoParte[0]}}</text:p>
      <text:p text:style-name="P2">Parte 1: {{codigoParte[0]}}<text:line-break/><text:line-break/>Principal 2: {{nmPrincipal[1]}}<text:line-break/>Ajudante 2: {{nmAjudante[1]}}<text:line-break/>Parte 2: {{codigoParte[1]}}<text:line-break/><text:line-break/>Principal 3: {{nmPrincipal[2]}}<text:line-break/>Ajudante 3: {{nmAjudante[2]}}<text:line-break/>Parte 3: {{codigoParte[2]}}<text:line-break/><text:line-break/>Principal 4: {{nmPrincipal[3]}}<text:line-break/>Ajudante 4: {{nmAjudante[3]}}<text:line-break/>Parte 4: {{codigoParte[3]}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0:07:36.010000000</meta:creation-date>
    <dc:date>2026-05-27T10:19:59.638000000</dc:date>
    <meta:editing-duration>PT48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43" meta:character-count="405" meta:non-whitespace-character-count="361"/>
  </office:meta>
</office:document-meta>
</file>