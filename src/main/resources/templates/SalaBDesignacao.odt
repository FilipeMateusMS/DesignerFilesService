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paragraph-properties fo:line-height="0.6cm"/>
      <style:text-properties fo:color="#000000" loext:opacity="100%" officeooo:paragraph-rsid="0044be6f"/>
    </style:style>
    <style:style style:name="P3" style:family="paragraph" style:parent-style-name="Standard">
      <style:text-properties fo:color="#000000" loext:opacity="100%" officeooo:rsid="001815df" officeooo:paragraph-rsid="001815df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6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6cm"/>
      <style:text-properties fo:color="#000000" loext:opacity="100%" officeooo:rsid="001815df" officeooo:paragraph-rsid="0021dccb"/>
    </style:style>
    <style:style style:name="P8" style:family="paragraph" style:parent-style-name="Standard">
      <style:text-properties fo:color="#000000" loext:opacity="100%" officeooo:paragraph-rsid="0044be6f"/>
    </style:style>
    <style:style style:name="P9" style:family="paragraph" style:parent-style-name="Standard">
      <style:text-properties fo:color="#000000" loext:opacity="100%" officeooo:rsid="00657b0d" officeooo:paragraph-rsid="00657b0d"/>
    </style:style>
    <style:style style:name="P10" style:family="paragraph" style:parent-style-name="Standard">
      <style:paragraph-properties fo:line-height="0.6cm"/>
      <style:text-properties fo:color="#000000" loext:opacity="100%" officeooo:rsid="00657b0d" officeooo:paragraph-rsid="00657b0d"/>
    </style:style>
    <style:style style:name="P11" style:family="paragraph" style:parent-style-name="Standard">
      <style:text-properties fo:color="#2a6099" loext:opacity="100%" officeooo:rsid="001815df" officeooo:paragraph-rsid="001815df"/>
    </style:style>
    <style:style style:name="P12" style:family="paragraph" style:parent-style-name="Standard">
      <style:paragraph-properties fo:line-height="0.45cm"/>
      <style:text-properties fo:color="#2a6099" loext:opacity="100%" officeooo:rsid="001815df" officeooo:paragraph-rsid="001815df"/>
    </style:style>
    <style:style style:name="P13" style:family="paragraph" style:parent-style-name="Standard">
      <style:paragraph-properties fo:line-height="0.45cm"/>
      <style:text-properties fo:color="#2a6099" loext:opacity="100%" officeooo:rsid="001815df" officeooo:paragraph-rsid="001dd3b8"/>
    </style:style>
    <style:style style:name="P14" style:family="paragraph" style:parent-style-name="Standard">
      <style:paragraph-properties fo:line-height="0.4cm"/>
      <style:text-properties fo:color="#2a6099" loext:opacity="100%" officeooo:rsid="001815df" officeooo:paragraph-rsid="001815df"/>
    </style:style>
    <style:style style:name="P15" style:family="paragraph" style:parent-style-name="Standard">
      <style:paragraph-properties fo:line-height="0.4cm"/>
      <style:text-properties fo:color="#2a6099" loext:opacity="100%" officeooo:rsid="001815df" officeooo:paragraph-rsid="001dd3b8"/>
    </style:style>
    <style:style style:name="P16" style:family="paragraph" style:parent-style-name="Standard">
      <style:paragraph-properties fo:line-height="0.4cm"/>
      <style:text-properties fo:color="#2a6099" loext:opacity="100%" officeooo:paragraph-rsid="0044be6f"/>
    </style:style>
    <style:style style:name="P17" style:family="paragraph" style:parent-style-name="Standard">
      <style:paragraph-properties fo:line-height="0.4cm"/>
      <style:text-properties fo:color="#2a6099" loext:opacity="100%" officeooo:paragraph-rsid="001815df"/>
    </style:style>
    <style:style style:name="P18" style:family="paragraph" style:parent-style-name="Standard">
      <style:paragraph-properties fo:line-height="0.4cm"/>
      <style:text-properties fo:color="#2a6099" loext:opacity="100%" officeooo:rsid="0044be6f" officeooo:paragraph-rsid="0044be6f"/>
    </style:style>
    <style:style style:name="P19" style:family="paragraph" style:parent-style-name="Standard">
      <style:paragraph-properties fo:line-height="0.45cm"/>
      <style:text-properties officeooo:paragraph-rsid="001815df"/>
    </style:style>
    <style:style style:name="P20" style:family="paragraph" style:parent-style-name="Standard">
      <style:paragraph-properties fo:line-height="0.4cm"/>
      <style:text-properties officeooo:paragraph-rsid="0044be6f"/>
    </style:style>
    <style:style style:name="P21" style:family="paragraph" style:parent-style-name="Standard">
      <style:paragraph-properties fo:line-height="0.4cm"/>
      <style:text-properties fo:color="#2a6099" loext:opacity="100%" officeooo:paragraph-rsid="0044be6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ff0000" loext:opacity="100%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1815df"/>
    </style:style>
    <style:style style:name="T7" style:family="text">
      <style:text-properties fo:color="#2a6099" loext:opacity="100%" officeooo:rsid="0044be6f"/>
    </style:style>
    <style:style style:name="T8" style:family="text">
      <style:text-properties fo:color="#2a6099" loext:opacity="100%" officeooo:rsid="0079ebec"/>
    </style:style>
    <style:style style:name="T9" style:family="text">
      <style:text-properties fo:color="#2a6099" loext:opacity="100%" officeooo:rsid="007a8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 text:c="12"/><text:span text:style-name="T5"><text:s text:c="3"/>{{nmPrincipal[0]}} <text:s text:c="89"/>{{nmPrincipal[1]}}</text:span></text:p>
      <text:p text:style-name="P12"/>
      <text:p text:style-name="P14"><text:s text:c="22"/>{{nmAjudante[0]}} <text:s text:c="87"/>{{nmAjudante[1]}}</text:p>
      <text:p text:style-name="P14"/>
      <text:p text:style-name="P15"><text:s text:c="16"/><text:span text:style-name="T2">{{semana[0]}} <text:s text:c="66"/>{{semana[1]}}</text:span></text:p>
      <text:p text:style-name="P13"/>
      <text:p text:style-name="P19"><text:span text:style-name="T6"><text:s text:c="37"/>{{cdPrt[0]}} <text:s text:c="86"/></text:span><text:span text:style-name="T5"><text:s text:c="8"/>{{cdPrt[1]}}</text:span></text:p>
      <text:p text:style-name="P12"/>
      <text:p text:style-name="P5"/>
      <text:p text:style-name="P5"/>
      <text:p text:style-name="P5"/>
      <text:p text:style-name="P1"><text:s text:c="2"/><text:span text:style-name="T4"><text:s text:c="4"/>✔ <text:s text:c="96"/>✔ </text:span>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11"/>
      <text:p text:style-name="P16"><text:span text:style-name="T1"><text:s text:c="15"/></text:span><text:span text:style-name="T3">{{nmPrincipal[2]}} <text:s text:c="87"/>{{nmPrincipal[3]}}</text:span></text:p>
      <text:p text:style-name="P17"/>
      <text:p text:style-name="P16"><text:tab/> <text:s text:c="11"/><text:span text:style-name="T3">{{nmAjudante[2]}} <text:s text:c="85"/>{{nmAjudante[3]}}</text:span></text:p>
      <text:p text:style-name="P16"/>
      <text:p text:style-name="P18"><text:s text:c="16"/>{{semana[2]}} <text:s text:c="66"/>{{semana[3]}}</text:p>
      <text:p text:style-name="P16"/>
      <text:p text:style-name="P20"><text:span text:style-name="T7"><text:tab/><text:tab/> <text:s text:c="13"/>{{cdPrt[2]}} <text:s text:c="83"/></text:span><text:span text:style-name="T5"><text:s text:c="11"/>{{</text:span><text:span text:style-name="T9">cdPrt</text:span><text:span text:style-name="T5">[3]}}</text:span></text:p>
      <text:p text:style-name="P16"/>
      <text:p text:style-name="P8"/>
      <text:p text:style-name="P9"/>
      <text:p text:style-name="P10"/>
      <text:p text:style-name="P2"><text:s text:c="3"/><text:span text:style-name="T4"><text:s text:c="3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1T15:46:10.326000000</dc:date>
    <meta:editing-duration>PT5H52M11S</meta:editing-duration>
    <meta:editing-cycles>7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79" meta:non-whitespace-character-count="244"/>
  </office:meta>
</office:document-meta>
</file>