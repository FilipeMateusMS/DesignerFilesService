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15df"/>
    </style:style>
    <style:style style:name="P2" style:family="paragraph" style:parent-style-name="Standard">
      <style:text-properties officeooo:rsid="001815df" officeooo:paragraph-rsid="001815df"/>
    </style:style>
    <style:style style:name="P3" style:family="paragraph" style:parent-style-name="Standard">
      <style:text-properties officeooo:rsid="001815df" officeooo:paragraph-rsid="001dd3b8"/>
    </style:style>
    <style:style style:name="P4" style:family="paragraph" style:parent-style-name="Standard">
      <style:paragraph-properties fo:line-height="115%"/>
      <style:text-properties officeooo:rsid="001815df" officeooo:paragraph-rsid="001815df"/>
    </style:style>
    <style:style style:name="P5" style:family="paragraph" style:parent-style-name="Standard">
      <style:paragraph-properties fo:line-height="115%"/>
      <style:text-properties officeooo:rsid="001815df" officeooo:paragraph-rsid="0021dccb"/>
    </style:style>
    <style:style style:name="P6" style:family="paragraph" style:parent-style-name="Standard">
      <style:text-properties officeooo:paragraph-rsid="0021dccb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text:s text:c="14"/>{{nmPrincipal[0]}} <text:s text:c="71"/>{{nmPrincipal[1]}}</text:p>
      <text:p text:style-name="P4"/>
      <text:p text:style-name="P4"><text:s text:c="16"/>{{nmAjudante[0]}} <text:s text:c="74"/>{{nmAjudante[1]}}</text:p>
      <text:p text:style-name="P2"><text:tab/></text:p>
      <text:p text:style-name="P3"><text:s text:c="2"/><text:span text:style-name="T2">{{semana[0]}} <text:s text:c="75"/>{{semana[1]}}</text:span></text:p>
      <text:p text:style-name="P2"/>
      <text:p text:style-name="P2"><text:s text:c="27"/>{{codigoParte[0]}} <text:s text:c="69"/>{{codigoParte[1]}}</text:p>
      <text:p text:style-name="P2"/>
      <text:p text:style-name="P2"/>
      <text:p text:style-name="P2"/>
      <text:p text:style-name="P6">✔ <text:s text:c="100"/>✔ </text:p>
      <text:p text:style-name="P1"><text:span text:style-name="T1"><text:s text:c="10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0"/>{{nmPrincipal[2]}} <text:s text:c="70"/>{{nmPrincipal[3]}}</text:p>
      <text:p text:style-name="P2"/>
      <text:p text:style-name="P2"><text:s text:c="17"/>{{nmAjudante[2]}} <text:s text:c="70"/>{{nmPrincipal[3]}}</text:p>
      <text:p text:style-name="P2"/>
      <text:p text:style-name="P3"><text:tab/> <text:s text:c="4"/><text:span text:style-name="T2">{{semana[2]}} <text:s text:c="72"/>{{semana[2]}}</text:span></text:p>
      <text:p text:style-name="P2"/>
      <text:p text:style-name="P2"><text:s text:c="36"/>{{codigoParte[2]}} <text:s text:c="60"/>{{codigoParte[3]}}</text:p>
      <text:p text:style-name="P2"/>
      <text:p text:style-name="P2"/>
      <text:p text:style-name="P2"/>
      <text:p text:style-name="P2"/>
      <text:p text:style-name="P1"><text:span text:style-name="T1">✔ <text:s text:c="104"/></text:span>✔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27T15:44:36.875000000</dc:date>
    <meta:editing-duration>PT53M37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2" meta:word-count="20" meta:character-count="1278" meta:non-whitespace-character-count="269"/>
  </office:meta>
</office:document-meta>
</file>